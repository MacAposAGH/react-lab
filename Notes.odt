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bc652" officeooo:paragraph-rsid="000bc652"/>
    </style:style>
    <style:style style:name="P2" style:family="paragraph" style:parent-style-name="Standard">
      <style:text-properties officeooo:rsid="000e9a8a" officeooo:paragraph-rsid="000e9a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cdu</text:p>
      <text:p text:style-name="P2">transpilacja – kod źródłowy na inny kod źródłowy, JavaScript IDE → JavaScript przeglądark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6T09:27:36.008945483</meta:creation-date>
    <dc:date>2026-05-16T09:41:53.194008151</dc:date>
    <meta:editing-duration>PT14M18S</meta:editing-duration>
    <meta:editing-cycles>2</meta:editing-cycles>
    <meta:generator>LibreOffice/25.2.6.2$Linux_X86_64 LibreOffice_project/520$Build-2</meta:generator>
    <meta:document-statistic meta:table-count="0" meta:image-count="0" meta:object-count="0" meta:page-count="1" meta:paragraph-count="2" meta:word-count="13" meta:character-count="94" meta:non-whitespace-character-count="82"/>
  </office:meta>
</office:document-meta>
</file>